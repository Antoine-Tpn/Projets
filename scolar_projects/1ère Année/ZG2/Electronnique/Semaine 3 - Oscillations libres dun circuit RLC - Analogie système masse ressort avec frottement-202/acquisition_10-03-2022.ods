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t_expérience" table:style-name="ta1">
        <table:shapes>
          <draw:frame draw:z-index="0" draw:style-name="gr1" draw:text-style-name="P1" svg:width="35.97cm" svg:height="20.294cm" svg:x="5.505cm" svg:y="1.629cm">
            <draw:object draw:notify-on-update-of-ranges="resultat_expérience.B2:resultat_expérience.B261 resultat_expérience.C1:resultat_expérience.C1 resultat_expérience.C2:resultat_expérience.C2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120" calcext:value-type="float">
            <text:p>120</text:p>
          </table:table-cell>
        </table:table-row>
        <table:table-row table:style-name="ro1">
          <table:table-cell/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116" calcext:value-type="float">
            <text:p>116</text:p>
          </table:table-cell>
        </table:table-row>
        <table:table-row table:style-name="ro1">
          <table:table-cell/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110" calcext:value-type="float">
            <text:p>110</text:p>
          </table:table-cell>
        </table:table-row>
        <table:table-row table:style-name="ro1">
          <table:table-cell/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116" calcext:value-type="float">
            <text:p>116</text:p>
          </table:table-cell>
        </table:table-row>
        <table:table-row table:style-name="ro1">
          <table:table-cell/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118" calcext:value-type="float">
            <text:p>118</text:p>
          </table:table-cell>
        </table:table-row>
        <table:table-row table:style-name="ro1">
          <table:table-cell/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118" calcext:value-type="float">
            <text:p>118</text:p>
          </table:table-cell>
        </table:table-row>
        <table:table-row table:style-name="ro1">
          <table:table-cell/>
          <table:table-cell table:style-name="ce3" office:value-type="float" office:value="0.7" calcext:value-type="float">
            <text:p>0,7</text:p>
          </table:table-cell>
          <table:table-cell table:style-name="ce3" office:value-type="float" office:value="116" calcext:value-type="float">
            <text:p>116</text:p>
          </table:table-cell>
        </table:table-row>
        <table:table-row table:style-name="ro1">
          <table:table-cell/>
          <table:table-cell table:style-name="ce3" office:value-type="float" office:value="0.8" calcext:value-type="float">
            <text:p>0,8</text:p>
          </table:table-cell>
          <table:table-cell table:style-name="ce3" office:value-type="float" office:value="112" calcext:value-type="float">
            <text:p>112</text:p>
          </table:table-cell>
        </table:table-row>
        <table:table-row table:style-name="ro1">
          <table:table-cell/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120" calcext:value-type="float">
            <text:p>120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</table:table-row>
        <table:table-row table:style-name="ro1">
          <table:table-cell/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114" calcext:value-type="float">
            <text:p>114</text:p>
          </table:table-cell>
        </table:table-row>
        <table:table-row table:style-name="ro1">
          <table:table-cell/>
          <table:table-cell table:style-name="ce3" office:value-type="float" office:value="1.2" calcext:value-type="float">
            <text:p>1,2</text:p>
          </table:table-cell>
          <table:table-cell table:style-name="ce3" office:value-type="float" office:value="122" calcext:value-type="float">
            <text:p>122</text:p>
          </table:table-cell>
        </table:table-row>
        <table:table-row table:style-name="ro1">
          <table:table-cell/>
          <table:table-cell table:style-name="ce3" office:value-type="float" office:value="1.3" calcext:value-type="float">
            <text:p>1,3</text:p>
          </table:table-cell>
          <table:table-cell table:style-name="ce3" office:value-type="float" office:value="118" calcext:value-type="float">
            <text:p>118</text:p>
          </table:table-cell>
        </table:table-row>
        <table:table-row table:style-name="ro1">
          <table:table-cell/>
          <table:table-cell table:style-name="ce3" office:value-type="float" office:value="1.4" calcext:value-type="float">
            <text:p>1,4</text:p>
          </table:table-cell>
          <table:table-cell table:style-name="ce3" office:value-type="float" office:value="122" calcext:value-type="float">
            <text:p>122</text:p>
          </table:table-cell>
        </table:table-row>
        <table:table-row table:style-name="ro1">
          <table:table-cell/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120" calcext:value-type="float">
            <text:p>120</text:p>
          </table:table-cell>
        </table:table-row>
        <table:table-row table:style-name="ro1">
          <table:table-cell/>
          <table:table-cell table:style-name="ce3" office:value-type="float" office:value="1.6" calcext:value-type="float">
            <text:p>1,6</text:p>
          </table:table-cell>
          <table:table-cell table:style-name="ce3" office:value-type="float" office:value="120" calcext:value-type="float">
            <text:p>120</text:p>
          </table:table-cell>
        </table:table-row>
        <table:table-row table:style-name="ro1">
          <table:table-cell/>
          <table:table-cell table:style-name="ce3" office:value-type="float" office:value="1.7" calcext:value-type="float">
            <text:p>1,7</text:p>
          </table:table-cell>
          <table:table-cell table:style-name="ce3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.8" calcext:value-type="float">
            <text:p>1,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/>
          <table:table-cell office:value-type="float" office:value="2.2" calcext:value-type="float">
            <text:p>2,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float" office:value="2.4" calcext:value-type="float">
            <text:p>2,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2.6" calcext:value-type="float">
            <text:p>2,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2.7" calcext:value-type="float">
            <text:p>2,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float" office:value="2.9" calcext:value-type="float">
            <text:p>2,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/>
          <table:table-cell office:value-type="float" office:value="3.1" calcext:value-type="float">
            <text:p>3,1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/>
          <table:table-cell office:value-type="float" office:value="3.2" calcext:value-type="float">
            <text:p>3,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float" office:value="3.3" calcext:value-type="float">
            <text:p>3,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float" office:value="3.4" calcext:value-type="float">
            <text:p>3,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3.6" calcext:value-type="float">
            <text:p>3,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3.7" calcext:value-type="float">
            <text:p>3,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/>
          <table:table-cell office:value-type="float" office:value="3.8" calcext:value-type="float">
            <text:p>3,8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/>
          <table:table-cell office:value-type="float" office:value="3.9" calcext:value-type="float">
            <text:p>3,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float" office:value="4.1" calcext:value-type="float">
            <text:p>4,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4.2" calcext:value-type="float">
            <text:p>4,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4.3" calcext:value-type="float">
            <text:p>4,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4.4" calcext:value-type="float">
            <text:p>4,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/>
          <table:table-cell office:value-type="float" office:value="4.6" calcext:value-type="float">
            <text:p>4,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4.7" calcext:value-type="float">
            <text:p>4,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/>
          <table:table-cell office:value-type="float" office:value="4.8" calcext:value-type="float">
            <text:p>4,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4.9" calcext:value-type="float">
            <text:p>4,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5.1" calcext:value-type="float">
            <text:p>5,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5.2" calcext:value-type="float">
            <text:p>5,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5.3" calcext:value-type="float">
            <text:p>5,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float" office:value="5.4" calcext:value-type="float">
            <text:p>5,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float" office:value="5.6" calcext:value-type="float">
            <text:p>5,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float" office:value="5.7" calcext:value-type="float">
            <text:p>5,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5.8" calcext:value-type="float">
            <text:p>5,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5.9" calcext:value-type="float">
            <text:p>5,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6.1" calcext:value-type="float">
            <text:p>6,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/>
          <table:table-cell office:value-type="float" office:value="6.2" calcext:value-type="float">
            <text:p>6,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/>
          <table:table-cell office:value-type="float" office:value="6.3" calcext:value-type="float">
            <text:p>6,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6.4" calcext:value-type="float">
            <text:p>6,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float" office:value="6.5" calcext:value-type="float">
            <text:p>6,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float" office:value="6.6" calcext:value-type="float">
            <text:p>6,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float" office:value="6.7" calcext:value-type="float">
            <text:p>6,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float" office:value="6.8" calcext:value-type="float">
            <text:p>6,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6.9" calcext:value-type="float">
            <text:p>6,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float" office:value="7.1" calcext:value-type="float">
            <text:p>7,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/>
          <table:table-cell office:value-type="float" office:value="7.2" calcext:value-type="float">
            <text:p>7,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float" office:value="7.3" calcext:value-type="float">
            <text:p>7,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float" office:value="7.4" calcext:value-type="float">
            <text:p>7,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7.5" calcext:value-type="float">
            <text:p>7,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7.6" calcext:value-type="float">
            <text:p>7,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float" office:value="7.7" calcext:value-type="float">
            <text:p>7,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float" office:value="7.8" calcext:value-type="float">
            <text:p>7,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/>
          <table:table-cell office:value-type="float" office:value="7.9" calcext:value-type="float">
            <text:p>7,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8.1" calcext:value-type="float">
            <text:p>8,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8.2" calcext:value-type="float">
            <text:p>8,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8.3" calcext:value-type="float">
            <text:p>8,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float" office:value="8.4" calcext:value-type="float">
            <text:p>8,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float" office:value="8.5" calcext:value-type="float">
            <text:p>8,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float" office:value="8.6" calcext:value-type="float">
            <text:p>8,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/>
          <table:table-cell office:value-type="float" office:value="8.7" calcext:value-type="float">
            <text:p>8,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  <table:table-cell office:value-type="float" office:value="8.8" calcext:value-type="float">
            <text:p>8,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8.9" calcext:value-type="float">
            <text:p>8,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9.1" calcext:value-type="float">
            <text:p>9,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9.2" calcext:value-type="float">
            <text:p>9,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float" office:value="9.3" calcext:value-type="float">
            <text:p>9,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float" office:value="9.4" calcext:value-type="float">
            <text:p>9,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float" office:value="9.5" calcext:value-type="float">
            <text:p>9,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float" office:value="9.6" calcext:value-type="float">
            <text:p>9,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float" office:value="9.7" calcext:value-type="float">
            <text:p>9,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float" office:value="9.8" calcext:value-type="float">
            <text:p>9,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9.9" calcext:value-type="float">
            <text:p>9,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float" office:value="10.1" calcext:value-type="float">
            <text:p>10,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/>
          <table:table-cell office:value-type="float" office:value="10.2" calcext:value-type="float">
            <text:p>10,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/>
          <table:table-cell office:value-type="float" office:value="10.3" calcext:value-type="float">
            <text:p>10,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float" office:value="10.4" calcext:value-type="float">
            <text:p>10,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float" office:value="10.5" calcext:value-type="float">
            <text:p>10,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float" office:value="10.6" calcext:value-type="float">
            <text:p>10,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10.7" calcext:value-type="float">
            <text:p>10,7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10.8" calcext:value-type="float">
            <text:p>10,8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float" office:value="10.9" calcext:value-type="float">
            <text:p>10,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11.1" calcext:value-type="float">
            <text:p>11,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float" office:value="11.2" calcext:value-type="float">
            <text:p>11,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11.3" calcext:value-type="float">
            <text:p>11,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11.4" calcext:value-type="float">
            <text:p>11,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11.5" calcext:value-type="float">
            <text:p>11,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11.6" calcext:value-type="float">
            <text:p>11,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float" office:value="11.7" calcext:value-type="float">
            <text:p>11,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/>
          <table:table-cell office:value-type="float" office:value="11.8" calcext:value-type="float">
            <text:p>11,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/>
          <table:table-cell office:value-type="float" office:value="11.9" calcext:value-type="float">
            <text:p>11,9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12.1" calcext:value-type="float">
            <text:p>12,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12.2" calcext:value-type="float">
            <text:p>12,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float" office:value="12.3" calcext:value-type="float">
            <text:p>12,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float" office:value="12.4" calcext:value-type="float">
            <text:p>12,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float" office:value="12.5" calcext:value-type="float">
            <text:p>12,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float" office:value="12.6" calcext:value-type="float">
            <text:p>12,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  <table:table-cell office:value-type="float" office:value="12.7" calcext:value-type="float">
            <text:p>12,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12.8" calcext:value-type="float">
            <text:p>12,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float" office:value="12.9" calcext:value-type="float">
            <text:p>12,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13.1" calcext:value-type="float">
            <text:p>13,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13.2" calcext:value-type="float">
            <text:p>13,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13.3" calcext:value-type="float">
            <text:p>13,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float" office:value="13.4" calcext:value-type="float">
            <text:p>13,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13.5" calcext:value-type="float">
            <text:p>13,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float" office:value="13.6" calcext:value-type="float">
            <text:p>13,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13.7" calcext:value-type="float">
            <text:p>13,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13.8" calcext:value-type="float">
            <text:p>13,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float" office:value="13.9" calcext:value-type="float">
            <text:p>13,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float" office:value="14.1" calcext:value-type="float">
            <text:p>14,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14.2" calcext:value-type="float">
            <text:p>14,2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/>
          <table:table-cell office:value-type="float" office:value="14.3" calcext:value-type="float">
            <text:p>14,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14.4" calcext:value-type="float">
            <text:p>14,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14.5" calcext:value-type="float">
            <text:p>14,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14.6" calcext:value-type="float">
            <text:p>14,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14.7" calcext:value-type="float">
            <text:p>14,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float" office:value="14.8" calcext:value-type="float">
            <text:p>14,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14.9" calcext:value-type="float">
            <text:p>14,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float" office:value="15.1" calcext:value-type="float">
            <text:p>15,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15.2" calcext:value-type="float">
            <text:p>15,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15.3" calcext:value-type="float">
            <text:p>15,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15.4" calcext:value-type="float">
            <text:p>15,4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float" office:value="15.5" calcext:value-type="float">
            <text:p>15,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15.6" calcext:value-type="float">
            <text:p>15,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float" office:value="15.7" calcext:value-type="float">
            <text:p>15,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float" office:value="15.8" calcext:value-type="float">
            <text:p>15,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float" office:value="15.9" calcext:value-type="float">
            <text:p>15,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16.1" calcext:value-type="float">
            <text:p>16,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16.2" calcext:value-type="float">
            <text:p>16,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16.3" calcext:value-type="float">
            <text:p>16,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16.4" calcext:value-type="float">
            <text:p>16,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float" office:value="16.5" calcext:value-type="float">
            <text:p>16,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float" office:value="16.6" calcext:value-type="float">
            <text:p>16,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16.7" calcext:value-type="float">
            <text:p>16,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16.8" calcext:value-type="float">
            <text:p>16,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16.9" calcext:value-type="float">
            <text:p>16,9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17.1" calcext:value-type="float">
            <text:p>17,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17.2" calcext:value-type="float">
            <text:p>17,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17.3" calcext:value-type="float">
            <text:p>17,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float" office:value="17.4" calcext:value-type="float">
            <text:p>17,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float" office:value="17.5" calcext:value-type="float">
            <text:p>17,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float" office:value="17.6" calcext:value-type="float">
            <text:p>17,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17.7" calcext:value-type="float">
            <text:p>17,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float" office:value="17.8" calcext:value-type="float">
            <text:p>17,8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17.9" calcext:value-type="float">
            <text:p>17,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float" office:value="18.1" calcext:value-type="float">
            <text:p>18,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18.2" calcext:value-type="float">
            <text:p>18,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18.3" calcext:value-type="float">
            <text:p>18,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18.4" calcext:value-type="float">
            <text:p>18,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18.5" calcext:value-type="float">
            <text:p>18,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float" office:value="18.6" calcext:value-type="float">
            <text:p>18,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float" office:value="18.7" calcext:value-type="float">
            <text:p>18,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18.8" calcext:value-type="float">
            <text:p>18,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float" office:value="18.9" calcext:value-type="float">
            <text:p>18,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float" office:value="19.1" calcext:value-type="float">
            <text:p>19,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19.2" calcext:value-type="float">
            <text:p>19,2</text:p>
          </table:table-cell>
          <table:table-cell table:style-name="ce3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9.3" calcext:value-type="float">
            <text:p>19,3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19.4" calcext:value-type="float">
            <text:p>19,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float" office:value="19.5" calcext:value-type="float">
            <text:p>19,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19.6" calcext:value-type="float">
            <text:p>19,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float" office:value="19.7" calcext:value-type="float">
            <text:p>19,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19.8" calcext:value-type="float">
            <text:p>19,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float" office:value="19.9" calcext:value-type="float">
            <text:p>19,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20.1" calcext:value-type="float">
            <text:p>20,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20.2" calcext:value-type="float">
            <text:p>20,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float" office:value="20.3" calcext:value-type="float">
            <text:p>20,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20.4" calcext:value-type="float">
            <text:p>20,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20.5" calcext:value-type="float">
            <text:p>20,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20.6" calcext:value-type="float">
            <text:p>20,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20.7" calcext:value-type="float">
            <text:p>20,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20.8" calcext:value-type="float">
            <text:p>20,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20.9" calcext:value-type="float">
            <text:p>20,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21.1" calcext:value-type="float">
            <text:p>21,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21.2" calcext:value-type="float">
            <text:p>21,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1.3" calcext:value-type="float">
            <text:p>21,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1.4" calcext:value-type="float">
            <text:p>21,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21.5" calcext:value-type="float">
            <text:p>21,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21.6" calcext:value-type="float">
            <text:p>21,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21.7" calcext:value-type="float">
            <text:p>21,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21.8" calcext:value-type="float">
            <text:p>21,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float" office:value="21.9" calcext:value-type="float">
            <text:p>21,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float" office:value="22.1" calcext:value-type="float">
            <text:p>22,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22.2" calcext:value-type="float">
            <text:p>22,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22.3" calcext:value-type="float">
            <text:p>22,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float" office:value="22.4" calcext:value-type="float">
            <text:p>22,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float" office:value="22.5" calcext:value-type="float">
            <text:p>22,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float" office:value="22.6" calcext:value-type="float">
            <text:p>22,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22.7" calcext:value-type="float">
            <text:p>22,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22.8" calcext:value-type="float">
            <text:p>22,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22.9" calcext:value-type="float">
            <text:p>22,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23.1" calcext:value-type="float">
            <text:p>23,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23.2" calcext:value-type="float">
            <text:p>23,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23.3" calcext:value-type="float">
            <text:p>23,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23.4" calcext:value-type="float">
            <text:p>23,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23.5" calcext:value-type="float">
            <text:p>23,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23.6" calcext:value-type="float">
            <text:p>23,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23.7" calcext:value-type="float">
            <text:p>23,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23.8" calcext:value-type="float">
            <text:p>23,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23.9" calcext:value-type="float">
            <text:p>23,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24.1" calcext:value-type="float">
            <text:p>24,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24.2" calcext:value-type="float">
            <text:p>24,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24.3" calcext:value-type="float">
            <text:p>24,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24.4" calcext:value-type="float">
            <text:p>24,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24.5" calcext:value-type="float">
            <text:p>24,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24.6" calcext:value-type="float">
            <text:p>24,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24.7" calcext:value-type="float">
            <text:p>24,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24.8" calcext:value-type="float">
            <text:p>24,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float" office:value="24.9" calcext:value-type="float">
            <text:p>24,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25.1" calcext:value-type="float">
            <text:p>25,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25.2" calcext:value-type="float">
            <text:p>25,2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float" office:value="25.3" calcext:value-type="float">
            <text:p>25,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float" office:value="25.4" calcext:value-type="float">
            <text:p>25,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25.5" calcext:value-type="float">
            <text:p>25,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25.6" calcext:value-type="float">
            <text:p>25,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25.7" calcext:value-type="float">
            <text:p>25,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25.8" calcext:value-type="float">
            <text:p>25,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25.9" calcext:value-type="float">
            <text:p>25,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88" calcext:value-type="float">
            <text:p>288</text:p>
          </table:table-cell>
        </table:table-row>
        <table:table-row table:style-name="ro1" table:number-rows-repeated="104831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18:30:15.6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0T18:34:40.444000000</dc:date>
    <meta:editing-duration>PT9M57S</meta:editing-duration>
    <meta:editing-cycles>2</meta:editing-cycles>
    <meta:generator>LibreOffice/7.1.8.1$Windows_X86_64 LibreOffice_project/e1f30c802c3269a1d052614453f260e49458c82c</meta:generator>
    <meta:document-statistic meta:table-count="1" meta:cell-count="52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971cm" svg:height="20.295cm" xlink:href=".." xlink:type="simple" chart:class="chart:scatter" chart:style-name="ch1">
        <chart:legend chart:legend-position="end" svg:x="34.442cm" svg:y="9.848cm" style:legend-expansion="high" chart:style-name="ch2"/>
        <chart:plot-area chart:style-name="ch3" table:cell-range-address="resultat_expérience.B2:resultat_expérience.C261 resultat_expérience.C1:resultat_expérience.C1" chart:data-source-has-labels="row" svg:x="0.719cm" svg:y="0.405cm" svg:width="33.004cm" svg:height="19.485cm">
          <chart:coordinate-region svg:x="1.526cm" svg:y="0.604cm" svg:width="32.01cm" svg:height="18.6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at_expérience.C2:resultat_expérience.C261" chart:label-cell-address="resultat_expérience.C1:resultat_expérience.C1" chart:class="chart:scatter">
            <chart:domain table:cell-range-address="resultat_expérience.B2:resultat_expérience.B261"/>
            <chart:data-point chart:repeated="2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x</text:p>
                <draw:g>
                  <svg:desc>resultat_expérience.C1:resultat_expérienc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resultat_expérience.B2:resultat_expérience.B261</svg:desc>
                </draw:g>
              </table:table-cell>
              <table:table-cell office:value-type="float" office:value="120">
                <text:p>120</text:p>
                <draw:g>
                  <svg:desc>resultat_expérience.C2:resultat_expérience.C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">
                <text:p>5.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">
                <text:p>6.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">
                <text:p>6.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">
                <text:p>6.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">
                <text:p>6.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">
                <text:p>6.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">
                <text:p>6.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">
                <text:p>6.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">
                <text:p>7.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">
                <text:p>7.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">
                <text:p>7.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">
                <text:p>7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">
                <text:p>7.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">
                <text:p>7.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">
                <text:p>8.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">
                <text:p>8.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">
                <text:p>8.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">
                <text:p>8.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">
                <text:p>8.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">
                <text:p>8.6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">
                <text:p>8.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">
                <text:p>8.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">
                <text:p>9.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">
                <text:p>9.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">
                <text:p>9.3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">
                <text:p>9.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">
                <text:p>9.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">
                <text:p>9.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">
                <text:p>9.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">
                <text:p>9.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">
                <text:p>10.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">
                <text:p>10.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3">
                <text:p>10.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">
                <text:p>10.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">
                <text:p>10.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">
                <text:p>10.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">
                <text:p>10.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">
                <text:p>10.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">
                <text:p>10.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">
                <text:p>11.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">
                <text:p>11.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">
                <text:p>11.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">
                <text:p>11.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">
                <text:p>11.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6">
                <text:p>11.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">
                <text:p>11.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">
                <text:p>11.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">
                <text:p>11.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1">
                <text:p>12.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2">
                <text:p>12.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">
                <text:p>12.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">
                <text:p>12.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">
                <text:p>12.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6">
                <text:p>12.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">
                <text:p>12.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8">
                <text:p>12.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">
                <text:p>12.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1">
                <text:p>13.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">
                <text:p>13.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3">
                <text:p>13.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4">
                <text:p>13.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5">
                <text:p>13.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6">
                <text:p>13.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7">
                <text:p>13.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8">
                <text:p>13.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9">
                <text:p>13.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1">
                <text:p>14.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2">
                <text:p>14.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3">
                <text:p>14.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4">
                <text:p>14.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">
                <text:p>14.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6">
                <text:p>14.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7">
                <text:p>14.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8">
                <text:p>14.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9">
                <text:p>14.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1">
                <text:p>15.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3">
                <text:p>15.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4">
                <text:p>15.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5">
                <text:p>15.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">
                <text:p>15.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">
                <text:p>15.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8">
                <text:p>15.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">
                <text:p>15.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1">
                <text:p>16.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2">
                <text:p>16.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3">
                <text:p>16.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4">
                <text:p>16.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">
                <text:p>16.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">
                <text:p>16.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">
                <text:p>16.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">
                <text:p>16.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">
                <text:p>16.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">
                <text:p>17.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2">
                <text:p>17.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">
                <text:p>17.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4">
                <text:p>17.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5">
                <text:p>17.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6">
                <text:p>17.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7">
                <text:p>17.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8">
                <text:p>17.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9">
                <text:p>17.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1">
                <text:p>18.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2">
                <text:p>18.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3">
                <text:p>18.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4">
                <text:p>18.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5">
                <text:p>18.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6">
                <text:p>18.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7">
                <text:p>18.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8">
                <text:p>18.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9">
                <text:p>18.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">
                <text:p>1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1">
                <text:p>19.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2">
                <text:p>19.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3">
                <text:p>19.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4">
                <text:p>19.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5">
                <text:p>19.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6">
                <text:p>19.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7">
                <text:p>19.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8">
                <text:p>19.8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9">
                <text:p>19.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1">
                <text:p>20.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2">
                <text:p>20.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3">
                <text:p>20.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4">
                <text:p>20.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5">
                <text:p>20.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6">
                <text:p>20.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7">
                <text:p>20.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8">
                <text:p>20.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9">
                <text:p>20.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1">
                <text:p>21.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2">
                <text:p>21.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3">
                <text:p>21.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4">
                <text:p>21.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5">
                <text:p>21.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6">
                <text:p>21.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7">
                <text:p>21.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8">
                <text:p>21.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9">
                <text:p>21.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">
                <text:p>2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1">
                <text:p>22.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2">
                <text:p>22.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3">
                <text:p>22.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4">
                <text:p>22.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5">
                <text:p>22.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6">
                <text:p>22.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7">
                <text:p>22.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8">
                <text:p>22.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9">
                <text:p>22.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">
                <text:p>2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1">
                <text:p>23.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2">
                <text:p>23.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3">
                <text:p>23.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4">
                <text:p>23.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5">
                <text:p>23.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6">
                <text:p>23.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7">
                <text:p>23.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8">
                <text:p>23.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9">
                <text:p>23.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">
                <text:p>2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1">
                <text:p>24.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2">
                <text:p>24.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3">
                <text:p>24.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4">
                <text:p>24.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5">
                <text:p>24.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6">
                <text:p>24.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7">
                <text:p>24.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8">
                <text:p>24.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9">
                <text:p>24.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1">
                <text:p>25.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2">
                <text:p>25.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3">
                <text:p>25.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4">
                <text:p>25.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5">
                <text:p>25.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">
                <text:p>25.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">
                <text:p>25.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8">
                <text:p>25.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9">
                <text:p>25.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">
                <text:p>26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